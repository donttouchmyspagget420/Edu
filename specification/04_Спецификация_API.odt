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2"/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пецификация API</text:h>
      <text:h text:style-name="Heading_20_2" text:outline-level="2">1. Общие сведения</text:h>
      <text:list text:style-name="L1">
        <text:list-item>
          <text:p text:style-name="P1"><text:span text:style-name="T1">Базовый URL</text:span>: <text:span text:style-name="T2">api.php</text:span></text:p>
        </text:list-item>
        <text:list-item>
          <text:p text:style-name="P1"><text:span text:style-name="T1">Формат ответа</text:span>: JSON (Content-Type: application/json)</text:p>
        </text:list-item>
        <text:list-item>
          <text:p text:style-name="P1"><text:span text:style-name="T1">Метод</text:span>: GET</text:p>
        </text:list-item>
        <text:list-item>
          <text:p text:style-name="P1"><text:span text:style-name="T1">Кодировка</text:span>: UTF-8</text:p>
        </text:list-item>
      </text:list>
      <text:h text:style-name="Heading_20_2" text:outline-level="2" text:is-list-header="true">2. Эндпоинты</text:h>
      <text:h text:style-name="Heading_20_3" text:outline-level="3">2.1 Получение списка предметов</text:h>
      <text:p text:style-name="Text_20_body"><text:span text:style-name="T1">Запрос</text:span>:</text:p>
      <text:p text:style-name="P2">GET api.php?action=subjects&amp;lang=en</text:p>
      <text:p text:style-name="Text_20_body"><text:span text:style-name="T1">Параметры</text:span>: | Параметр | Тип | Обязательный | По умолчанию | Описание | |----------|-----|--------------|--------------|----------| | action | string | да | — | subjects | | lang | string | нет | en | Код языка (en, ru, kk) |</text:p>
      <text:p text:style-name="Text_20_body"><text:span text:style-name="T1">Ответ</text:span>:</text:p>
      <text:p text:style-name="P2">[<text:line-break/> <text:s/>{<text:line-break/> <text:s text:c="3"/>"id": 1,<text:line-break/> <text:s text:c="3"/>"name": "Қазақ тілі",<text:line-break/> <text:s text:c="3"/>"description": "5-сыныпқа арналған қазақ тілі пәні...",<text:line-break/> <text:s text:c="3"/>"icon": "bi-book"<text:line-break/> <text:s/>}<text:line-break/>]</text:p>
      <text:p text:style-name="Text_20_body">SQL-запрос:</text:p>
      <text:p text:style-name="P2">SELECT id, name{suffix} AS name, description{suffix} AS description, icon<text:line-break/>FROM subjects ORDER BY name</text:p>
      <text:h text:style-name="Heading_20_3" text:outline-level="3">2.2 Получение разделов предмета</text:h>
      <text:p text:style-name="Text_20_body"><text:span text:style-name="T1">Запрос</text:span>:</text:p>
      <text:p text:style-name="P2">GET api.php?action=themes&amp;subject_id=1&amp;lang=ru</text:p>
      <text:p text:style-name="Text_20_body"><text:span text:style-name="T1">Параметры</text:span>: | Параметр | Тип | Обязательный | По умолчанию | Описание | |----------|-----|--------------|--------------|----------| | action | string | да | — | themes | | subject_id | int | да | 0 | ID предмета | | lang | string | нет | en | Код языка |</text:p>
      <text:p text:style-name="Text_20_body"><text:span text:style-name="T1">Ответ</text:span>:</text:p>
      <text:p text:style-name="P2">[<text:line-break/> <text:s/>{<text:line-break/> <text:s text:c="3"/>"id": 1,<text:line-break/> <text:s text:c="3"/>"name": "Речевая деятельность",<text:line-break/> <text:s text:c="3"/>"description": "Развитие навыков аудирования, говорения, чтения..."<text:line-break/> <text:s/>}<text:line-break/>]</text:p>
      <text:p text:style-name="Text_20_body">SQL-запрос:</text:p>
      <text:p text:style-name="P2">SELECT id, name{suffix} AS name, description{suffix} AS description<text:line-break/>FROM themes WHERE subject_id = ? ORDER BY name</text:p>
      <text:h text:style-name="Heading_20_3" text:outline-level="3">2.3 Получение тем раздела</text:h>
      <text:p text:style-name="Text_20_body"><text:span text:style-name="T1">Запрос</text:span>:</text:p>
      <text:p text:style-name="P2">GET api.php?action=topics&amp;theme_id=1&amp;lang=en</text:p>
      <text:p text:style-name="Text_20_body"><text:span text:style-name="T1">Параметры</text:span>: | Параметр | Тип | Обязательный | По умолчанию | Описание | |----------|-----|--------------|--------------|----------| | action | string | да | — | topics | | theme_id | int | да | 0 | ID раздела | | lang | string | нет | en | Код языка |</text:p>
      <text:p text:style-name="Text_20_body"><text:span text:style-name="T1">Ответ</text:span>:</text:p>
      <text:p text:style-name="P2">[<text:line-break/> <text:s/>{<text:line-break/> <text:s text:c="3"/>"id": 1,<text:line-break/> <text:s text:c="3"/>"title": "Аудирование и говорение",<text:line-break/> <text:s text:c="3"/>"summary": "В этой теме учащиеся развивают навыки аудирования...",<text:line-break/> <text:s text:c="3"/>"examples": "Прослушайте текст...",<text:line-break/> <text:s text:c="3"/>"youtube_url": "https://www.youtube.com/results?search_query=..."<text:line-break/> <text:s/>}<text:line-break/>]</text:p>
      <text:p text:style-name="Text_20_body">SQL-запрос:</text:p>
      <text:p text:style-name="P2">SELECT id, title{suffix} AS title, summary{suffix} AS summary,<text:line-break/> <text:s text:c="6"/>examples{suffix} AS examples, youtube_url<text:line-break/>FROM topics WHERE theme_id = ? ORDER BY id</text:p>
      <text:h text:style-name="Heading_20_2" text:outline-level="2">3. Обработка ошибок</text:h>
      <text:p text:style-name="Text_20_body">При неверном <text:span text:style-name="T2">action</text:span> возвращается:</text:p>
      <text:p text:style-name="P2">{<text:line-break/> <text:s/>"error": "Invalid action"<text:line-break/>}</text:p>
      <text:h text:style-name="Heading_20_2" text:outline-level="2">4. Клиентский API (JavaScript)</text:h>
      <text:p text:style-name="Text_20_body">Обёртка для fetch-запросов с автоматическим добавлением языка:</text:p>
      <text:p text:style-name="P2">function api(path) {<text:line-break/> <text:s text:c="3"/>return fetch(`${path}&amp;lang=${currentLang}`).then(r =&gt; r.json());<text:line-break/>}</text:p>
      <text:p text:style-name="Text_20_body">Использование:</text:p>
      <text:p text:style-name="P2">api('api.php?action=subjects') <text:s text:c="6"/>// subjects<text:line-break/>api(`api.php?action=themes&amp;subject_id=${id}`)<text:line-break/>api(`api.php?action=topics&amp;theme_id=${id}`)</text:p>
      <text:h text:style-name="Heading_20_2" text:outline-level="2">5. Безопасность</text:h>
      <text:list text:style-name="L2">
        <text:list-item>
          <text:p text:style-name="P3"><text:span text:style-name="T2">subject_id</text:span> и <text:span text:style-name="T2">theme_id</text:span> приводятся к типу int (<text:span text:style-name="T2">(int)$_GET[...]</text:span>)</text:p>
        </text:list-item>
        <text:list-item>
          <text:p text:style-name="P3">Используются подготовленные запросы (prepared statements)</text:p>
        </text:list-item>
        <text:list-item>
          <text:p text:style-name="P3">Язык фильтруется через белый список: <text:span text:style-name="T2">in_array($lang, ['ru', 'kk'])</text:span>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urce Han Serif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43" meta:word-count="370" meta:character-count="2655" meta:non-whitespace-character-count="2268"/>
    <meta:generator>LibreOffice/26.2.4.2$Linux_X86_64 LibreOffice_project/620$Build-2</meta:generator>
  </office:meta>
</office:document-meta>
</file>