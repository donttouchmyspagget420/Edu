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Архитектура проекта JenylOku</text:h>
      <text:h text:style-name="Heading_20_2" text:outline-level="2">1. Общая архитектура</text:h>
      <text:p text:style-name="Text_20_body">Приложение построено по принципу <text:span text:style-name="T1">SPA (Single Page Application)</text:span> с серверным рендерингом начальной оболочки и асинхронной загрузкой контента через REST-like JSON API.</text:p>
      <text:h text:style-name="Heading_20_3" text:outline-level="3">1.1 Диаграмма компонентов</text:h>
      <text:p text:style-name="P1">Клиент (Браузер)<text:line-break/> <text:s text:c="5"/>│<text:line-break/> <text:s text:c="5"/>├── index.php ──────→ HTML-оболочка (Bootstrap)<text:line-break/> <text:s text:c="5"/>├── main.js ────────→ SPA-логика, fetch API<text:line-break/> <text:s text:c="5"/>├── style.css ──────→ Стили<text:line-break/> <text:s text:c="5"/>└── lang/*.json ────→ Файлы локализации<text:line-break/> <text:s text:c="13"/>│<text:line-break/> <text:s text:c="13"/>▼<text:line-break/> <text:s text:c="5"/>api.php (PHP)<text:line-break/> <text:s text:c="13"/>│<text:line-break/> <text:s text:c="13"/>▼<text:line-break/> <text:s text:c="5"/>MySQL (MariaDB)</text:p>
      <text:h text:style-name="Heading_20_3" text:outline-level="3">1.2 Поток данных</text:h>
      <text:list text:style-name="L1">
        <text:list-item>
          <text:p text:style-name="P2">Браузер загружает <text:span text:style-name="T2">index.php</text:span> — сервер отдаёт HTML с навбаром и подключёнными <text:span text:style-name="T2">views</text:span></text:p>
        </text:list-item>
        <text:list-item>
          <text:p text:style-name="P2"><text:span text:style-name="T2">main.js</text:span> загружает файл локализации <text:span text:style-name="T2">lang/{lang}.json</text:span></text:p>
        </text:list-item>
        <text:list-item>
          <text:p text:style-name="P2">При навигации JS переключает видимость секций (<text:span text:style-name="T2">.page-section</text:span>)</text:p>
        </text:list-item>
        <text:list-item>
          <text:p text:style-name="P2">Для загрузки контента JS вызывает <text:span text:style-name="T2">api.php?action=...&amp;lang=...</text:span></text:p>
        </text:list-item>
        <text:list-item>
          <text:p text:style-name="P2">API выполняет SQL-запросы и возвращает JSON</text:p>
        </text:list-item>
        <text:list-item>
          <text:p text:style-name="P2">JS рендерит данные в DOM</text:p>
        </text:list-item>
      </text:list>
      <text:h text:style-name="Heading_20_2" text:outline-level="2" text:is-list-header="true">2. Структура директорий</text:h>
      <text:p text:style-name="P1">JenylOku/<text:line-break/>├── index.php <text:s text:c="9"/># Точка входа — SPA-оболочка<text:line-break/>├── config.php <text:s text:c="8"/># Конфигурация БД (подключение, charset)<text:line-break/>├── api.php <text:s text:c="11"/># JSON API endpoint<text:line-break/>├── install.php <text:s text:c="7"/># Установщик (запуск SQL-дампа)<text:line-break/>├── db.sql <text:s text:c="12"/># Схема БД (CREATE TABLE)<text:line-break/>├── script.sql <text:s text:c="8"/># Данные (INSERT)<text:line-break/>├── main.js <text:s text:c="11"/># Клиентская логика<text:line-break/>├── style.css <text:s text:c="9"/># Пользовательские стили<text:line-break/>├── README.md <text:s text:c="9"/># Документация проекта<text:line-break/>├── lang/ <text:s text:c="13"/># Файлы локализации<text:line-break/>│ <text:s text:c="2"/>├── en.json<text:line-break/>│ <text:s text:c="2"/>├── ru.json<text:line-break/>│ <text:s text:c="2"/>└── kk.json<text:line-break/>└── views/ <text:s text:c="12"/># PHP-партиалы страниц<text:line-break/> <text:s text:c="3"/>├── home.php <text:s text:c="6"/># Главная<text:line-break/> <text:s text:c="3"/>├── subjects.php <text:s text:c="2"/># Предметы / разделы / темы<text:line-break/> <text:s text:c="3"/>└── about.php <text:s text:c="5"/># О проекте</text:p>
      <text:h text:style-name="Heading_20_2" text:outline-level="2">3. Описание модулей</text:h>
      <text:h text:style-name="Heading_20_3" text:outline-level="3">3.1 index.php</text:h>
      <text:p text:style-name="Text_20_body">SPA-оболочка. Содержит:</text:p>
      <text:list text:style-name="L2">
        <text:list-item>
          <text:p text:style-name="P3">Bootstrap 5 навбар с навигацией (Home, Subjects, About)</text:p>
        </text:list-item>
        <text:list-item>
          <text:p text:style-name="P3">Переключатель языков (EN, RU, KK)</text:p>
        </text:list-item>
        <text:list-item>
          <text:p text:style-name="P3"><text:span text:style-name="T2">&lt;main id="page-content"&gt;</text:span> для подключения views</text:p>
        </text:list-item>
        <text:list-item>
          <text:p text:style-name="P3">Футер</text:p>
        </text:list-item>
        <text:list-item>
          <text:p text:style-name="P3">Подключение Bootstrap JS и main.js</text:p>
        </text:list-item>
      </text:list>
      <text:h text:style-name="Heading_20_3" text:outline-level="3" text:is-list-header="true">3.2 main.js</text:h>
      <text:p text:style-name="Text_20_body">Клиентское SPA-приложение. Основные функции:</text:p>
      <text:list text:style-name="L3">
        <text:list-item>
          <text:p text:style-name="P4"><text:span text:style-name="T2">showPage(page)</text:span> — переключение видимого раздела</text:p>
        </text:list-item>
        <text:list-item>
          <text:p text:style-name="P4"><text:span text:style-name="T2">loadLang(lang)</text:span> — загрузка JSON-переводов</text:p>
        </text:list-item>
        <text:list-item>
          <text:p text:style-name="P4"><text:span text:style-name="T2">applyTranslations()</text:span> — применение data-i18n атрибутов</text:p>
        </text:list-item>
        <text:list-item>
          <text:p text:style-name="P4"><text:span text:style-name="T2">api(path)</text:span> — обёртка fetch с параметром lang</text:p>
        </text:list-item>
        <text:list-item>
          <text:p text:style-name="P4"><text:span text:style-name="T2">loadSubjects()</text:span>, <text:span text:style-name="T2">loadThemes()</text:span>, <text:span text:style-name="T2">loadTopics()</text:span> — загрузка данных</text:p>
        </text:list-item>
        <text:list-item>
          <text:p text:style-name="P4">Кэширование данных в <text:span text:style-name="T2">subjectsCache</text:span></text:p>
        </text:list-item>
        <text:list-item>
          <text:p text:style-name="P4">Сохранение языка в <text:span text:style-name="T2">localStorage</text:span></text:p>
        </text:list-item>
      </text:list>
      <text:h text:style-name="Heading_20_3" text:outline-level="3" text:is-list-header="true">3.3 api.php</text:h>
      <text:p text:style-name="Text_20_body">REST-like API. Принимает параметры:</text:p>
      <text:list text:style-name="L4">
        <text:list-item>
          <text:p text:style-name="P5"><text:span text:style-name="T2">action</text:span> (required): subjects | themes | topics</text:p>
        </text:list-item>
        <text:list-item>
          <text:p text:style-name="P5"><text:span text:style-name="T2">lang</text:span> (optional): en | ru | kk (по умолчанию en)</text:p>
        </text:list-item>
        <text:list-item>
          <text:p text:style-name="P5"><text:span text:style-name="T2">subject_id</text:span> / <text:span text:style-name="T2">theme_id</text:span> (для вложенных запросов)</text:p>
        </text:list-item>
      </text:list>
      <text:p text:style-name="Text_20_body">Автоматически подставляет суффикс языка в названия полей (name, name_ru, name_kk).</text:p>
      <text:h text:style-name="Heading_20_3" text:outline-level="3">3.4 config.php</text:h>
      <text:p text:style-name="Text_20_body">Подключение к MySQL с charset utf8mb4.</text:p>
      <text:h text:style-name="Heading_20_3" text:outline-level="3">3.5 install.php</text:h>
      <text:p text:style-name="Text_20_body">Запускает SQL-дамп для создания БД и наполнения данными.</text:p>
      <text:h text:style-name="Heading_20_2" text:outline-level="2">4. Принципы работы SPA</text:h>
      <text:list text:style-name="L5">
        <text:list-item>
          <text:p text:style-name="P6">Все страницы загружены в DOM при старте (home, subjects, about)</text:p>
        </text:list-item>
        <text:list-item>
          <text:p text:style-name="P6">Активная секция показывается, остальные скрыты через <text:span text:style-name="T2">.d-none</text:span></text:p>
        </text:list-item>
        <text:list-item>
          <text:p text:style-name="P6">Навигация без перезагрузки — через обработчики <text:span text:style-name="T2">[data-page]</text:span></text:p>
        </text:list-item>
        <text:list-item>
          <text:p text:style-name="P6">Контент предметов/разделов/тем загружается асинхронно</text:p>
        </text:list-item>
        <text:list-item>
          <text:p text:style-name="P6">Язык переключается динамически без перезагрузки</text:p>
        </text:list-item>
      </text:list>
      <text:h text:style-name="Heading_20_2" text:outline-level="2" text:is-list-header="true">5. Зависимости (CDN)</text:h>
      <text:list text:style-name="L6">
        <text:list-item>
          <text:p text:style-name="P7">Bootstrap 5.3.3 (CSS + JS)</text:p>
        </text:list-item>
        <text:list-item>
          <text:p text:style-name="P7">Bootstrap Icons 1.11.3</text:p>
        </text:list-item>
      </text:list>
      <text:p text:style-name="Text_20_body">Локальные зависимости отсутствуют. Сборка не требуется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urce Han Serif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51" meta:word-count="401" meta:character-count="3060" meta:non-whitespace-character-count="2492"/>
    <meta:generator>LibreOffice/26.2.4.2$Linux_X86_64 LibreOffice_project/620$Build-2</meta:generator>
  </office:meta>
</office:document-meta>
</file>