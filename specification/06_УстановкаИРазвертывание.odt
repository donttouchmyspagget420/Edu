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  <style:font-face style:name="Source Han Sans HW SC" svg:font-family="'Source Han Sans HW SC'" style:font-family-generic="modern" style:font-pitch="fixed"/>
    <style:font-face style:name="Source Han Sans SC" svg:font-family="'Source Han Sans SC'" style:font-family-generic="system" style:font-pitch="variable"/>
    <style:font-face style:name="Source Han Serif SC" svg:font-family="'Source Han Serif SC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3.4625in" style:rel-column-width="32767*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B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B2" style:family="table-cell">
      <style:table-cell-properties fo:padding="0.0382in" fo:border-left="0.5pt solid #000000" fo:border-right="0.5pt solid #000000" fo:border-top="none" fo:border-bottom="0.5pt solid #000000"/>
    </style:style>
    <style:style style:name="Table2" style:family="table">
      <style:table-properties table:align="margins"/>
    </style:style>
    <style:style style:name="Table2.A" style:family="table-column">
      <style:table-column-properties style:rel-column-width="32767*"/>
    </style:style>
    <style:style style:name="Table2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.B1" style:family="table-cell">
      <style:table-cell-properties fo:padding="0.0382in" fo:border="0.5pt solid #000000"/>
    </style:style>
    <style:style style:name="Table2.A2" style:family="table-cell">
      <style:table-cell-properties fo:padding="0.0382in" fo:border-left="0.5pt solid #000000" fo:border-right="none" fo:border-top="none" fo:border-bottom="0.5pt solid #000000"/>
    </style:style>
    <style:style style:name="Table2.B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Table_20_Heading">
      <style:paragraph-properties fo:text-align="left" style:justify-single-word="false"/>
    </style:style>
    <style:style style:name="P2" style:family="paragraph" style:parent-style-name="Table_20_Contents">
      <style:paragraph-properties fo:text-align="left" style:justify-single-word="false"/>
    </style:style>
    <style:style style:name="P3" style:family="paragraph" style:parent-style-name="Text_20_body" style:list-style-name="L1"/>
    <style:style style:name="P4" style:family="paragraph" style:parent-style-name="Preformatted_20_Text" style:list-style-name="L1">
      <style:paragraph-properties fo:margin-top="0in" fo:margin-bottom="0.1965in" style:contextual-spacing="false"/>
    </style:style>
    <style:style style:name="P5" style:family="paragraph" style:parent-style-name="Text_20_body" style:list-style-name="L2"/>
    <style:style style:name="P6" style:family="paragraph" style:parent-style-name="Preformatted_20_Text" style:list-style-name="L2">
      <style:paragraph-properties fo:margin-top="0in" fo:margin-bottom="0.1965in" style:contextual-spacing="false"/>
    </style:style>
    <style:style style:name="P7" style:family="paragraph" style:parent-style-name="Preformatted_20_Text">
      <style:paragraph-properties fo:margin-top="0in" fo:margin-bottom="0.1965in" style:contextual-spacing="false"/>
    </style:style>
    <style:style style:name="P8" style:family="paragraph" style:parent-style-name="Text_20_body" style:list-style-name="L3"/>
    <style:style style:name="P9" style:family="paragraph" style:parent-style-name="Text_20_body" style:list-style-name="L4"/>
    <style:style style:name="P10" style:family="paragraph" style:parent-style-name="Text_20_body" style:list-style-name="L5"/>
    <style:style style:name="T1" style:family="text">
      <style:text-properties style:font-name="Liberation Mono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Руководство по установке и развёртыванию</text:h>
      <text:h text:style-name="Heading_20_2" text:outline-level="2">1. Системные требования</text:h>
      <table:table table:name="Table1" table:style-name="Table1">
        <table:table-column table:style-name="Table1.A" table:number-columns-repeated="2"/>
        <table:table-header-rows>
          <table:table-row>
            <table:table-cell table:style-name="Table1.A1" office:value-type="string">
              <text:p text:style-name="P1">Компонент</text:p>
            </table:table-cell>
            <table:table-cell table:style-name="Table1.B1" office:value-type="string">
              <text:p text:style-name="P1">Версия</text:p>
            </table:table-cell>
          </table:table-row>
        </table:table-header-rows>
        <table:table-row>
          <table:table-cell table:style-name="Table1.A2" office:value-type="string">
            <text:p text:style-name="P2">PHP</text:p>
          </table:table-cell>
          <table:table-cell table:style-name="Table1.B2" office:value-type="string">
            <text:p text:style-name="P2">8.0+</text:p>
          </table:table-cell>
        </table:table-row>
        <table:table-row>
          <table:table-cell table:style-name="Table1.A2" office:value-type="string">
            <text:p text:style-name="P2">MariaDB / MySQL</text:p>
          </table:table-cell>
          <table:table-cell table:style-name="Table1.B2" office:value-type="string">
            <text:p text:style-name="P2">10.4+</text:p>
          </table:table-cell>
        </table:table-row>
        <table:table-row>
          <table:table-cell table:style-name="Table1.A2" office:value-type="string">
            <text:p text:style-name="P2">Веб-сервер</text:p>
          </table:table-cell>
          <table:table-cell table:style-name="Table1.B2" office:value-type="string">
            <text:p text:style-name="P2">Apache / Nginx</text:p>
          </table:table-cell>
        </table:table-row>
      </table:table>
      <text:p text:style-name="Text_20_body"/>
      <text:h text:style-name="Heading_20_2" text:outline-level="2">2. Установка</text:h>
      <text:h text:style-name="Heading_20_3" text:outline-level="3">2.1 Быстрая установка</text:h>
      <text:list text:style-name="L1">
        <text:list-item>
          <text:p text:style-name="P3">Разместите файлы проекта в корневой директории веб-сервера:</text:p>
          <text:p text:style-name="P4">/opt/lampp/htdocs/JenylOku/</text:p>
        </text:list-item>
        <text:list-item>
          <text:p text:style-name="P3">Запустите MariaDB (если не запущена).</text:p>
        </text:list-item>
        <text:list-item>
          <text:p text:style-name="P3">Откройте в браузере:</text:p>
          <text:p text:style-name="P4">http://localhost/JenylOku/install.php</text:p>
        </text:list-item>
        <text:list-item>
          <text:p text:style-name="P3">Установщик создаст базу данных <text:span text:style-name="T1">edu_platform</text:span> и наполнит её данными.</text:p>
        </text:list-item>
        <text:list-item>
          <text:p text:style-name="P3">Перейдите на <text:span text:style-name="T1">index.php</text:span> для начала работы.</text:p>
        </text:list-item>
      </text:list>
      <text:h text:style-name="Heading_20_3" text:outline-level="3" text:is-list-header="true">2.2 Установка вручную</text:h>
      <text:list text:style-name="L2">
        <text:list-item>
          <text:p text:style-name="P5">Создайте базу данных:</text:p>
          <text:p text:style-name="P6">CREATE DATABASE edu_platform CHARACTER SET utf8mb4 COLLATE utf8mb4_unicode_ci;<text:line-break/>USE edu_platform;</text:p>
        </text:list-item>
        <text:list-item>
          <text:p text:style-name="P5">Выполните <text:span text:style-name="T1">db.sql</text:span> для создания таблиц.</text:p>
        </text:list-item>
        <text:list-item>
          <text:p text:style-name="P5">Выполните <text:span text:style-name="T1">script.sql</text:span> для наполнения данными.</text:p>
        </text:list-item>
        <text:list-item>
          <text:p text:style-name="P5">Проверьте параметры подключения в <text:span text:style-name="T1">config.php</text:span>:</text:p>
          <text:p text:style-name="P6">$host = 'localhost';<text:line-break/>$user = 'root';<text:line-break/>$pass = '';<text:line-break/>$dbname = 'edu_platform';</text:p>
        </text:list-item>
      </text:list>
      <text:h text:style-name="Heading_20_2" text:outline-level="2" text:is-list-header="true">3. Конфигурация</text:h>
      <text:h text:style-name="Heading_20_3" text:outline-level="3">3.1 Подключение к БД (config.php)</text:h>
      <text:p text:style-name="P7">$host = 'localhost'; <text:s text:c="3"/>// Хост БД<text:line-break/>$user = 'root'; <text:s text:c="8"/>// Пользователь<text:line-break/>$pass = ''; <text:s text:c="12"/>// Пароль<text:line-break/>$dbname = 'edu_platform'; // Имя БД</text:p>
      <text:h text:style-name="Heading_20_3" text:outline-level="3">3.2 Файл установки (install.php)</text:h>
      <text:p text:style-name="Text_20_body">Скрипт выполняет:</text:p>
      <text:list text:style-name="L3">
        <text:list-item>
          <text:p text:style-name="P8">Подключение к MySQL без указания БД</text:p>
        </text:list-item>
        <text:list-item>
          <text:p text:style-name="P8">DROP DATABASE IF EXISTS edu_platform</text:p>
        </text:list-item>
        <text:list-item>
          <text:p text:style-name="P8">Выполнение db.sql (создание схемы)</text:p>
        </text:list-item>
        <text:list-item>
          <text:p text:style-name="P8">Выполнение script.sql (наполнение данными)</text:p>
        </text:list-item>
      </text:list>
      <text:h text:style-name="Heading_20_2" text:outline-level="2" text:is-list-header="true">4. Развёртывание на production</text:h>
      <text:list text:style-name="L4">
        <text:list-item>
          <text:p text:style-name="P9">Измените параметры подключения к БД в <text:span text:style-name="T1">config.php</text:span></text:p>
        </text:list-item>
        <text:list-item>
          <text:p text:style-name="P9">Удалите <text:span text:style-name="T1">install.php</text:span> после установки (в целях безопасности)</text:p>
        </text:list-item>
        <text:list-item>
          <text:p text:style-name="P9">Настройте веб-сервер для работы с PHP</text:p>
        </text:list-item>
      </text:list>
      <text:h text:style-name="Heading_20_2" text:outline-level="2" text:is-list-header="true">5. Структура URL</text:h>
      <table:table table:name="Table2" table:style-name="Table2">
        <table:table-column table:style-name="Table2.A" table:number-columns-repeated="2"/>
        <table:table-header-rows>
          <table:table-row>
            <table:table-cell table:style-name="Table2.A1" office:value-type="string">
              <text:p text:style-name="P1">URL</text:p>
            </table:table-cell>
            <table:table-cell table:style-name="Table2.B1" office:value-type="string">
              <text:p text:style-name="P1">Описание</text:p>
            </table:table-cell>
          </table:table-row>
        </table:table-header-rows>
        <table:table-row>
          <table:table-cell table:style-name="Table2.A2" office:value-type="string">
            <text:p text:style-name="P2">/JenylOku/index.php</text:p>
          </table:table-cell>
          <table:table-cell table:style-name="Table2.B2" office:value-type="string">
            <text:p text:style-name="P2">Главная страница</text:p>
          </table:table-cell>
        </table:table-row>
        <table:table-row>
          <table:table-cell table:style-name="Table2.A2" office:value-type="string">
            <text:p text:style-name="P2">/JenylOku/install.php</text:p>
          </table:table-cell>
          <table:table-cell table:style-name="Table2.B2" office:value-type="string">
            <text:p text:style-name="P2">Установщик</text:p>
          </table:table-cell>
        </table:table-row>
        <table:table-row>
          <table:table-cell table:style-name="Table2.A2" office:value-type="string">
            <text:p text:style-name="P2">/JenylOku/api.php?action=...</text:p>
          </table:table-cell>
          <table:table-cell table:style-name="Table2.B2" office:value-type="string">
            <text:p text:style-name="P2">JSON API</text:p>
          </table:table-cell>
        </table:table-row>
      </table:table>
      <text:p text:style-name="Text_20_body"/>
      <text:h text:style-name="Heading_20_2" text:outline-level="2">6. Примечания</text:h>
      <text:list text:style-name="L5">
        <text:list-item>
          <text:p text:style-name="P10">Данные статичны и загружаются из SQL-дампа</text:p>
        </text:list-item>
        <text:list-item>
          <text:p text:style-name="P10">Все зависимости подключаются через CDN</text:p>
        </text:list-item>
        <text:list-item>
          <text:p text:style-name="P10">Не требует npm/yarn/composer</text:p>
        </text:list-item>
        <text:list-item>
          <text:p text:style-name="P10">Не требует сборки или компиляции</text:p>
        </text:list-item>
      </text:list>
      <text:p text:style-name="Text_20_body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  <style:font-face style:name="Source Han Sans HW SC" svg:font-family="'Source Han Sans HW SC'" style:font-family-generic="modern" style:font-pitch="fixed"/>
    <style:font-face style:name="Source Han Sans SC" svg:font-family="'Source Han Sans SC'" style:font-family-generic="system" style:font-pitch="variable"/>
    <style:font-face style:name="Source Han Serif SC" svg:font-family="'Source Han Serif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urce Han Serif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Source Han Serif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SC" style:font-family-asian="'Source Han Sans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Source Han Sans HW SC" style:font-family-asian="'Source Han Sans HW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document-statistic meta:table-count="2" meta:image-count="0" meta:object-count="0" meta:page-count="1" meta:paragraph-count="53" meta:word-count="232" meta:character-count="1666" meta:non-whitespace-character-count="1484"/>
    <meta:generator>LibreOffice/26.2.4.2$Linux_X86_64 LibreOffice_project/620$Build-2</meta:generator>
  </office:meta>
</office:document-meta>
</file>