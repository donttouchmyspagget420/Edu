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Техническое задание (SRS) — JenylOku</text:h>
      <text:h text:style-name="Heading_20_2" text:outline-level="2">1. Введение</text:h>
      <text:h text:style-name="Heading_20_3" text:outline-level="3">1.1 Назначение</text:h>
      <text:p text:style-name="Text_20_body">JenylOku — это образовательная веб-платформа для учащихся 5 классов школ Казахстана. Платформа предоставляет структурированный доступ к учебным материалам по всем предметам, организованным по принципу: <text:span text:style-name="T1">Предмет → Раздел → Тема</text:span>.</text:p>
      <text:h text:style-name="Heading_20_3" text:outline-level="3">1.2 Цели</text:h>
      <text:list text:style-name="L1">
        <text:list-item>
          <text:p text:style-name="P1">Предоставить ученикам удобный интерфейс для изучения школьной программы</text:p>
        </text:list-item>
        <text:list-item>
          <text:p text:style-name="P1">Организовать знания по предметам 5 класса в иерархическую структуру</text:p>
        </text:list-item>
        <text:list-item>
          <text:p text:style-name="P1">Обеспечить мультиязычную поддержку (казахский, русский, английский)</text:p>
        </text:list-item>
        <text:list-item>
          <text:p text:style-name="P1">Интегрировать ссылки на обучающие видео с YouTube</text:p>
        </text:list-item>
        <text:list-item>
          <text:p text:style-name="P1">Обеспечить быстрый и понятный доступ к кратким конспектам и примерам</text:p>
        </text:list-item>
      </text:list>
      <text:h text:style-name="Heading_20_3" text:outline-level="3" text:is-list-header="true">1.3 Целевая аудитория</text:h>
      <text:list text:style-name="L2">
        <text:list-item>
          <text:p text:style-name="P2">Учащиеся 5 классов (основное звено, 10-12 лет)</text:p>
        </text:list-item>
        <text:list-item>
          <text:p text:style-name="P2">Учителя, использующие платформу для подготовки материалов</text:p>
        </text:list-item>
        <text:list-item>
          <text:p text:style-name="P2">Родители, помогающие детям с учебой</text:p>
        </text:list-item>
      </text:list>
      <text:h text:style-name="Heading_20_2" text:outline-level="2" text:is-list-header="true">2. Функциональные требования</text:h>
      <text:h text:style-name="Heading_20_3" text:outline-level="3">2.1 Основные функции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">ID</text:p>
            </table:table-cell>
            <table:table-cell table:style-name="Table1.A1" office:value-type="string">
              <text:p text:style-name="P3">Функция</text:p>
            </table:table-cell>
            <table:table-cell table:style-name="Table1.C1" office:value-type="string">
              <text:p text:style-name="P3">Описание</text:p>
            </table:table-cell>
          </table:table-row>
        </table:table-header-rows>
        <table:table-row>
          <table:table-cell table:style-name="Table1.A2" office:value-type="string">
            <text:p text:style-name="P4">F01</text:p>
          </table:table-cell>
          <table:table-cell table:style-name="Table1.A2" office:value-type="string">
            <text:p text:style-name="P4">Навигация по страницам</text:p>
          </table:table-cell>
          <table:table-cell table:style-name="Table1.C2" office:value-type="string">
            <text:p text:style-name="P4">SPA-навигация: Главная, Предметы, О проекте</text:p>
          </table:table-cell>
        </table:table-row>
        <table:table-row>
          <table:table-cell table:style-name="Table1.A2" office:value-type="string">
            <text:p text:style-name="P4">F02</text:p>
          </table:table-cell>
          <table:table-cell table:style-name="Table1.A2" office:value-type="string">
            <text:p text:style-name="P4">Просмотр предметов</text:p>
          </table:table-cell>
          <table:table-cell table:style-name="Table1.C2" office:value-type="string">
            <text:p text:style-name="P4">Отображение списка всех предметов с иконками и описанием</text:p>
          </table:table-cell>
        </table:table-row>
        <table:table-row>
          <table:table-cell table:style-name="Table1.A2" office:value-type="string">
            <text:p text:style-name="P4">F03</text:p>
          </table:table-cell>
          <table:table-cell table:style-name="Table1.A2" office:value-type="string">
            <text:p text:style-name="P4">Просмотр разделов</text:p>
          </table:table-cell>
          <table:table-cell table:style-name="Table1.C2" office:value-type="string">
            <text:p text:style-name="P4">При клике на предмет отображаются его разделы</text:p>
          </table:table-cell>
        </table:table-row>
        <table:table-row>
          <table:table-cell table:style-name="Table1.A2" office:value-type="string">
            <text:p text:style-name="P4">F04</text:p>
          </table:table-cell>
          <table:table-cell table:style-name="Table1.A2" office:value-type="string">
            <text:p text:style-name="P4">Просмотр тем</text:p>
          </table:table-cell>
          <table:table-cell table:style-name="Table1.C2" office:value-type="string">
            <text:p text:style-name="P4">При клике на раздел отображаются темы с конспектами</text:p>
          </table:table-cell>
        </table:table-row>
        <table:table-row>
          <table:table-cell table:style-name="Table1.A2" office:value-type="string">
            <text:p text:style-name="P4">F05</text:p>
          </table:table-cell>
          <table:table-cell table:style-name="Table1.A2" office:value-type="string">
            <text:p text:style-name="P4">Мультиязычность</text:p>
          </table:table-cell>
          <table:table-cell table:style-name="Table1.C2" office:value-type="string">
            <text:p text:style-name="P4">Переключение между казахским, русским и английским языками</text:p>
          </table:table-cell>
        </table:table-row>
        <table:table-row>
          <table:table-cell table:style-name="Table1.A2" office:value-type="string">
            <text:p text:style-name="P4">F06</text:p>
          </table:table-cell>
          <table:table-cell table:style-name="Table1.A2" office:value-type="string">
            <text:p text:style-name="P4">Поиск видео</text:p>
          </table:table-cell>
          <table:table-cell table:style-name="Table1.C2" office:value-type="string">
            <text:p text:style-name="P4">Ссылки на YouTube по каждой теме</text:p>
          </table:table-cell>
        </table:table-row>
        <table:table-row>
          <table:table-cell table:style-name="Table1.A2" office:value-type="string">
            <text:p text:style-name="P4">F07</text:p>
          </table:table-cell>
          <table:table-cell table:style-name="Table1.A2" office:value-type="string">
            <text:p text:style-name="P4">Адаптивный дизайн</text:p>
          </table:table-cell>
          <table:table-cell table:style-name="Table1.C2" office:value-type="string">
            <text:p text:style-name="P4">Корректное отображение на мобильных устройствах</text:p>
          </table:table-cell>
        </table:table-row>
      </table:table>
      <text:p text:style-name="Text_20_body"/>
      <text:h text:style-name="Heading_20_3" text:outline-level="3">2.2 Структура данных</text:h>
      <text:p text:style-name="P5">Предмет (Subject)<text:line-break/> <text:s/>├── id, name, name_ru, name_kk, description, icon<text:line-break/> <text:s/>└── Раздел (Theme)<text:line-break/> <text:s text:c="7"/>├── id, name, name_ru, name_kk, description<text:line-break/> <text:s text:c="7"/>└── Тема (Topic)<text:line-break/> <text:s text:c="13"/>├── id, title, title_ru, title_kk, summary, examples, youtube_url</text:p>
      <text:h text:style-name="Heading_20_3" text:outline-level="3">2.3 Поддерживаемые предметы (14 предметов)</text:h>
      <text:list text:style-name="L3">
        <text:list-item>
          <text:p text:style-name="P6">Казахский язык</text:p>
        </text:list-item>
        <text:list-item>
          <text:p text:style-name="P6">Казахская литература</text:p>
        </text:list-item>
        <text:list-item>
          <text:p text:style-name="P6">Русский язык</text:p>
        </text:list-item>
        <text:list-item>
          <text:p text:style-name="P6">Русская литература</text:p>
        </text:list-item>
        <text:list-item>
          <text:p text:style-name="P6">Казахский язык и литература (для русских школ)</text:p>
        </text:list-item>
        <text:list-item>
          <text:p text:style-name="P6">Английский язык</text:p>
        </text:list-item>
        <text:list-item>
          <text:p text:style-name="P6">Математика</text:p>
        </text:list-item>
        <text:list-item>
          <text:p text:style-name="P6">Информатика</text:p>
        </text:list-item>
        <text:list-item>
          <text:p text:style-name="P6">Естествознание</text:p>
        </text:list-item>
        <text:list-item>
          <text:p text:style-name="P6">История Казахстана</text:p>
        </text:list-item>
        <text:list-item>
          <text:p text:style-name="P6">Всемирная история</text:p>
        </text:list-item>
        <text:list-item>
          <text:p text:style-name="P6">Музыка</text:p>
        </text:list-item>
        <text:list-item>
          <text:p text:style-name="P6">Художественный труд</text:p>
        </text:list-item>
        <text:list-item>
          <text:p text:style-name="P6">Физическая культура</text:p>
        </text:list-item>
      </text:list>
      <text:h text:style-name="Heading_20_2" text:outline-level="2" text:is-list-header="true">3. Нефункциональные требования</text:h>
      <text:h text:style-name="Heading_20_3" text:outline-level="3">3.1 Технологический стек</text:h>
      <text:list text:style-name="L4">
        <text:list-item>
          <text:p text:style-name="P7"><text:span text:style-name="T1">Backend</text:span>: PHP 8.0+</text:p>
        </text:list-item>
        <text:list-item>
          <text:p text:style-name="P7"><text:span text:style-name="T1">База данных</text:span>: MariaDB / MySQL 10.4+</text:p>
        </text:list-item>
        <text:list-item>
          <text:p text:style-name="P7"><text:span text:style-name="T1">Frontend</text:span>: Bootstrap 5.3.3 (CDN), Bootstrap Icons 1.11.3 (CDN)</text:p>
        </text:list-item>
        <text:list-item>
          <text:p text:style-name="P7"><text:span text:style-name="T1">Сборка</text:span>: не требуется (без менеджеров пакетов)</text:p>
        </text:list-item>
      </text:list>
      <text:h text:style-name="Heading_20_3" text:outline-level="3" text:is-list-header="true">3.2 Требования к производительности</text:h>
      <text:list text:style-name="L5">
        <text:list-item>
          <text:p text:style-name="P8">Время загрузки страницы: не более 2 секунд</text:p>
        </text:list-item>
        <text:list-item>
          <text:p text:style-name="P8">Кэширование данных на клиенте (subjectsCache)</text:p>
        </text:list-item>
        <text:list-item>
          <text:p text:style-name="P8">Асинхронная загрузка через JSON API</text:p>
        </text:list-item>
      </text:list>
      <text:h text:style-name="Heading_20_3" text:outline-level="3" text:is-list-header="true">3.3 Требования к безопасности</text:h>
      <text:list text:style-name="L6">
        <text:list-item>
          <text:p text:style-name="P9">Экранирование пользовательского ввода (int, prepared statements)</text:p>
        </text:list-item>
        <text:list-item>
          <text:p text:style-name="P9">Защита от SQL-инъекций через подготовленные запросы</text:p>
        </text:list-item>
      </text:list>
      <text:h text:style-name="Heading_20_3" text:outline-level="3" text:is-list-header="true">3.4 Локализация</text:h>
      <text:list text:style-name="L7">
        <text:list-item>
          <text:p text:style-name="P10">Поддержка 3 языков: казахский (kk), русский (ru), английский (en)</text:p>
        </text:list-item>
        <text:list-item>
          <text:p text:style-name="P10">Переводы хранятся в JSON-файлах</text:p>
        </text:list-item>
        <text:list-item>
          <text:p text:style-name="P10">Переключение языка без перезагрузки страницы</text:p>
        </text:list-item>
        <text:list-item>
          <text:p text:style-name="P10">Сохранение выбранного языка в localStorage</text:p>
        </text:list-item>
      </text:list>
      <text:h text:style-name="Heading_20_2" text:outline-level="2" text:is-list-header="true">4. Архитектура системы</text:h>
      <text:h text:style-name="Heading_20_3" text:outline-level="3">4.1 Компоненты</text:h>
      <text:p text:style-name="P5">index.php <text:s text:c="9"/>— SPA-оболочка (навбар, футер, подключение views)<text:line-break/>install.php <text:s text:c="7"/>— Установщик БД (создание БД + наполнение)<text:line-break/>config.php <text:s text:c="8"/>— Подключение к БД<text:line-break/>api.php <text:s text:c="11"/>— JSON API (с учётом языка)<text:line-break/>main.js <text:s text:c="11"/>— Клиентская логика (SPA, API-запросы, переводы)<text:line-break/>style.css <text:s text:c="9"/>— Пользовательские стили<text:line-break/>lang/en.json <text:s text:c="6"/>— Переводы на английский<text:line-break/>lang/ru.json <text:s text:c="6"/>— Переводы на русский<text:line-break/>lang/kk.json <text:s text:c="6"/>— Переводы на казахский<text:line-break/>views/home.php <text:s text:c="4"/>— Главная страница<text:line-break/>views/subjects.php — Страница предметов<text:line-break/>views/about.php <text:s text:c="3"/>— Страница «О проекте»<text:line-break/>db.sql <text:s text:c="12"/>— Схема базы данных<text:line-break/>script.sql <text:s text:c="8"/>— Наполнение данными (все предметы, разделы, темы)</text:p>
      <text:h text:style-name="Heading_20_2" text:outline-level="2">5. Пользовательские сценарии</text:h>
      <text:h text:style-name="Heading_20_3" text:outline-level="3">5.1 Сценарий: Просмотр предметов</text:h>
      <text:list text:style-name="L8">
        <text:list-item>
          <text:p text:style-name="P11">Пользователь открывает index.php</text:p>
        </text:list-item>
        <text:list-item>
          <text:p text:style-name="P11">Нажимает «Предметы» в навигации</text:p>
        </text:list-item>
        <text:list-item>
          <text:p text:style-name="P11">Система загружает список предметов через API</text:p>
        </text:list-item>
        <text:list-item>
          <text:p text:style-name="P11">Отображаются карточки с иконками и описанием</text:p>
        </text:list-item>
      </text:list>
      <text:h text:style-name="Heading_20_3" text:outline-level="3" text:is-list-header="true">5.2 Сценарий: Изучение темы</text:h>
      <text:list text:style-name="L9">
        <text:list-item>
          <text:p text:style-name="P12">Пользователь выбирает предмет → раздел</text:p>
        </text:list-item>
        <text:list-item>
          <text:p text:style-name="P12">Система загружает темы раздела</text:p>
        </text:list-item>
        <text:list-item>
          <text:p text:style-name="P12">Пользователь нажимает «Показать объяснение»</text:p>
        </text:list-item>
        <text:list-item>
          <text:p text:style-name="P12">Отображается конспект темы и примеры</text:p>
        </text:list-item>
        <text:list-item>
          <text:p text:style-name="P12">Пользователь может перейти к видео на YouTube</text:p>
        </text:list-item>
      </text:list>
      <text:h text:style-name="Heading_20_3" text:outline-level="3" text:is-list-header="true">5.3 Сценарий: Смена языка</text:h>
      <text:list text:style-name="L10">
        <text:list-item>
          <text:p text:style-name="P13">Пользователь нажимает на переключатель языка</text:p>
        </text:list-item>
        <text:list-item>
          <text:p text:style-name="P13">Система загружает JSON-файл с переводами</text:p>
        </text:list-item>
        <text:list-item>
          <text:p text:style-name="P13">Все тексты на странице обновляются</text:p>
        </text:list-item>
        <text:list-item>
          <text:p text:style-name="P13">Выбранный язык сохраняется в localStorage</text:p>
        </text:list-item>
      </text:list>
      <text:h text:style-name="Heading_20_2" text:outline-level="2" text:is-list-header="true">6. Ограничения</text:h>
      <text:list text:style-name="L11">
        <text:list-item>
          <text:p text:style-name="P14">Данные статичны (загружаются из SQL-дампа)</text:p>
        </text:list-item>
        <text:list-item>
          <text:p text:style-name="P14">Нет авторизации и регистрации пользователей</text:p>
        </text:list-item>
        <text:list-item>
          <text:p text:style-name="P14">Нет возможности добавлять/редактировать контент через UI</text:p>
        </text:list-item>
        <text:list-item>
          <text:p text:style-name="P14">Все ссылки на YouTube ведут на поисковые запросы (не прямые ссылки)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image-count="0" meta:object-count="0" meta:page-count="1" meta:paragraph-count="100" meta:word-count="562" meta:character-count="4203" meta:non-whitespace-character-count="3643"/>
    <meta:generator>LibreOffice/26.2.4.2$Linux_X86_64 LibreOffice_project/620$Build-2</meta:generator>
  </office:meta>
</office:document-meta>
</file>