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able_20_Heading">
      <style:paragraph-properties fo:text-align="left" style:justify-single-word="false"/>
    </style:style>
    <style:style style:name="P11" style:family="paragraph" style:parent-style-name="Table_20_Contents">
      <style:paragraph-properties fo:text-align="lef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пецификация пользовательского интерфейса</text:h>
      <text:h text:style-name="Heading_20_2" text:outline-level="2">1. Общие принципы</text:h>
      <text:list text:style-name="L1">
        <text:list-item>
          <text:p text:style-name="P1"><text:span text:style-name="T1">Фреймворк</text:span>: Bootstrap 5.3.3</text:p>
        </text:list-item>
        <text:list-item>
          <text:p text:style-name="P1"><text:span text:style-name="T1">Иконки</text:span>: Bootstrap Icons 1.11.3</text:p>
        </text:list-item>
        <text:list-item>
          <text:p text:style-name="P1"><text:span text:style-name="T1">Адаптивность</text:span>: Mobile-first, 3 брейкпоинта</text:p>
        </text:list-item>
        <text:list-item>
          <text:p text:style-name="P1"><text:span text:style-name="T1">Анимация</text:span>: fadeIn 0.3s при переключении страниц</text:p>
        </text:list-item>
        <text:list-item>
          <text:p text:style-name="P1"><text:span text:style-name="T1">Цветовая схема</text:span>: <text:span text:style-name="T2">bg-primary</text:span> (синий Bootstrap)</text:p>
        </text:list-item>
      </text:list>
      <text:h text:style-name="Heading_20_2" text:outline-level="2" text:is-list-header="true">2. Макеты страниц</text:h>
      <text:h text:style-name="Heading_20_3" text:outline-level="3">2.1 Навбар (все страницы)</text:h>
      <text:p text:style-name="P2">[Иконка] EduLearn <text:s text:c="3"/>[Home] [Subjects] [About] <text:s text:c="3"/>[🌐 EN ▼]</text:p>
      <text:list text:style-name="L2">
        <text:list-item>
          <text:p text:style-name="P3">Логотип с иконкой <text:span text:style-name="T2">bi-mortarboard-fill</text:span></text:p>
        </text:list-item>
        <text:list-item>
          <text:p text:style-name="P3">Три пункта навигации с data-i18n для перевода</text:p>
        </text:list-item>
        <text:list-item>
          <text:p text:style-name="P3">Выпадающий список языков: English, Русский, Қазақша</text:p>
        </text:list-item>
        <text:list-item>
          <text:p text:style-name="P3">Текущий язык отображается заглавными буквами (EN, RU, KK)</text:p>
        </text:list-item>
      </text:list>
      <text:h text:style-name="Heading_20_3" text:outline-level="3" text:is-list-header="true">2.2 Главная страница (home)</text:h>
      <text:p text:style-name="P2">┌─────────────────────────────────────────────────┐<text:line-break/>│ <text:s text:c="48"/>│<text:line-break/>│ <text:s text:c="2"/>🎓 Добро пожаловать в EduLearn <text:s text:c="14"/>│<text:line-break/>│ <text:s text:c="2"/>Ваш портал в интерактивное обучение <text:s text:c="10"/>│<text:line-break/>│ <text:s text:c="48"/>│<text:line-break/>│ <text:s text:c="2"/>[🚀 Начать обучение] <text:s text:c="25"/>│<text:line-break/>│ <text:s text:c="48"/>│<text:line-break/>├────────────┬──────────────────┬──────────────────┤<text:line-break/>│ 📚 Изучай <text:s/>│ 🔀 Погружайся <text:s text:c="3"/>│ ▶️ Смотри и <text:s text:c="5"/>│<text:line-break/>│ предметы <text:s text:c="2"/>│ в темы <text:s text:c="10"/>│ учись <text:s text:c="11"/>│<text:line-break/>│ Широкий <text:s text:c="3"/>│ Каждый предмет <text:s text:c="2"/>│ Краткие обзоры <text:s text:c="2"/>│<text:line-break/>│ выбор... <text:s text:c="2"/>│ разделён на... <text:s text:c="2"/>│ и ссылки на... <text:s text:c="2"/>│<text:line-break/>└────────────┴──────────────────┴──────────────────┘</text:p>
      <text:h text:style-name="Heading_20_3" text:outline-level="3">2.3 Страница предметов (subjects)</text:h>
      <text:p text:style-name="Text_20_body"><text:span text:style-name="T1">Уровень 1: Предметы</text:span></text:p>
      <text:p text:style-name="P2">Subjects<text:line-break/>━━━━━━━━━━━━━━━━━━━━━━━━━━━━━━━━━━━━━━━━━━━━━<text:line-break/>Описание структуры платформы...<text:line-break/><text:line-break/>[📖 Казахский язык] <text:s/>[📖 Казахская лит-ра] [📖 Русский язык]<text:line-break/>[🌐 Английский язык] [🧮 Математика] <text:s text:c="6"/>[💻 Информатика]<text:line-break/>[🌸 Естествознание] <text:s/>[🏳️ История КЗ] <text:s text:c="5"/>[🌍 Всемирная история]<text:line-break/>...</text:p>
      <text:list text:style-name="L3">
        <text:list-item>
          <text:p text:style-name="P4">Карточки 3 в ряд (md), 2 в ряд (sm), 1 в ряд (xs)</text:p>
        </text:list-item>
        <text:list-item>
          <text:p text:style-name="P4">Каждая карточка: иконка (display-1), название, описание</text:p>
        </text:list-item>
        <text:list-item>
          <text:p text:style-name="P4">Hover-эффект: подъём на 4px, тень</text:p>
        </text:list-item>
      </text:list>
      <text:p text:style-name="Text_20_body"><text:span text:style-name="T1">Уровень 2: Разделы</text:span></text:p>
      <text:p text:style-name="P2">← Назад к предметам<text:line-break/><text:line-break/>Казахский язык<text:line-break/>━━━━━━━━━━━━━━━━━━━━━━━━━━━━━━━━━━━━━━━━━━━━━<text:line-break/>[Речевая деятельность] <text:s text:c="2"/>[Языковые нормы]<text:line-break/> <text:s/>Развитие навыков... <text:s text:c="5"/>Основы фонетики...</text:p>
      <text:p text:style-name="Text_20_body"><text:span text:style-name="T1">Уровень 3: Темы</text:span></text:p>
      <text:p text:style-name="P2">← Назад к разделам<text:line-break/><text:line-break/>Речевая деятельность<text:line-break/>━━━━━━━━━━━━━━━━━━━━━━━━━━━━━━━━━━━━━━━━━━━━━<text:line-break/>┌─────────────────────────────────────────────────┐<text:line-break/>│ Аудирование и говорение <text:s text:c="3"/>[▶ YouTube] <text:s text:c="9"/>│<text:line-break/>│ [📖 Показать объяснение ▼] <text:s text:c="21"/>│<text:line-break/>│ ┌─────────────────────────────────────────┐ <text:s text:c="3"/>│<text:line-break/>│ │ Конспект темы... <text:s text:c="22"/>│ <text:s text:c="3"/>│<text:line-break/>│ │ Примеры: ... <text:s text:c="26"/>│ <text:s text:c="3"/>│<text:line-break/>│ └─────────────────────────────────────────┘ <text:s text:c="3"/>│<text:line-break/>└─────────────────────────────────────────────────┘</text:p>
      <text:list text:style-name="L4">
        <text:list-item>
          <text:p text:style-name="P5">Кнопка "Показать объяснение" раскрывает конспект (Bootstrap collapse)</text:p>
        </text:list-item>
        <text:list-item>
          <text:p text:style-name="P5">Кнопка YouTube красная (btn-danger) с иконкой <text:span text:style-name="T2">bi-youtube</text:span></text:p>
        </text:list-item>
        <text:list-item>
          <text:p text:style-name="P5">Конспект и примеры на выбранном языке</text:p>
        </text:list-item>
      </text:list>
      <text:h text:style-name="Heading_20_3" text:outline-level="3" text:is-list-header="true">2.4 Страница «О проекте» (about)</text:h>
      <text:p text:style-name="P2">О проекте EduLearn<text:line-break/>━━━━━━━━━━━━━━━━━━━━━━━━━━━━━━━━━━━━━━━━━━━━━<text:line-break/>┌─────────────────────────────────────────────────┐<text:line-break/>│ JenylOku — бесплатная образовательная <text:s text:c="10"/>│<text:line-break/>│ платформа... <text:s text:c="36"/>│<text:line-break/>│ <text:s text:c="48"/>│<text:line-break/>│ Как это работает: <text:s text:c="31"/>│<text:line-break/>│ 1. Выберите предмет <text:s text:c="29"/>│<text:line-break/>│ 2. Просмотрите темы <text:s text:c="29"/>│<text:line-break/>│ 3. Читайте конспект и смотрите видео <text:s text:c="12"/>│<text:line-break/>│ <text:s text:c="48"/>│<text:line-break/>│ Создано с PHP, MariaDB и Bootstrap 5. <text:s text:c="10"/>│<text:line-break/>└─────────────────────────────────────────────────┘</text:p>
      <text:h text:style-name="Heading_20_3" text:outline-level="3">2.5 Футер</text:h>
      <text:p text:style-name="P2">© 2026 JenylOku. Все права защищены.</text:p>
      <text:h text:style-name="Heading_20_2" text:outline-level="2">3. Компоненты UI</text:h>
      <text:h text:style-name="Heading_20_3" text:outline-level="3">3.1 Карточка предмета</text:h>
      <text:list text:style-name="L5">
        <text:list-item>
          <text:p text:style-name="P6">Рамка: border-0, shadow-sm</text:p>
        </text:list-item>
        <text:list-item>
          <text:p text:style-name="P6">Скругление: 12px (border-radius)</text:p>
        </text:list-item>
        <text:list-item>
          <text:p text:style-name="P6">Анимация: translateY(-4px) + box-shadow при hover</text:p>
        </text:list-item>
        <text:list-item>
          <text:p text:style-name="P6">Иконка: display-1, text-primary</text:p>
        </text:list-item>
        <text:list-item>
          <text:p text:style-name="P6">Курсор: pointer</text:p>
        </text:list-item>
      </text:list>
      <text:h text:style-name="Heading_20_3" text:outline-level="3" text:is-list-header="true">3.2 Карточка раздела</text:h>
      <text:list text:style-name="L6">
        <text:list-item>
          <text:p text:style-name="P7">Аналогично предмету, но без иконок</text:p>
        </text:list-item>
        <text:list-item>
          <text:p text:style-name="P7">Анимация при hover</text:p>
        </text:list-item>
      </text:list>
      <text:h text:style-name="Heading_20_3" text:outline-level="3" text:is-list-header="true">3.3 Карточка темы</text:h>
      <text:list text:style-name="L7">
        <text:list-item>
          <text:p text:style-name="P8">border-0, shadow-sm</text:p>
        </text:list-item>
        <text:list-item>
          <text:p text:style-name="P8">Кнопка YouTube (btn-danger)</text:p>
        </text:list-item>
        <text:list-item>
          <text:p text:style-name="P8">Кнопка "Показать объяснение" (btn-outline-primary, border-radius: 20px)</text:p>
        </text:list-item>
        <text:list-item>
          <text:p text:style-name="P8">Collapse-блок с конспектом и примерами</text:p>
        </text:list-item>
      </text:list>
      <text:h text:style-name="Heading_20_3" text:outline-level="3" text:is-list-header="true">3.4 Загрузчик</text:h>
      <text:list text:style-name="L8">
        <text:list-item>
          <text:p text:style-name="P9">Bootstrap spinner (spinner-border text-primary)</text:p>
        </text:list-item>
        <text:list-item>
          <text:p text:style-name="P9">Отображается при загрузке данных через API</text:p>
        </text:list-item>
      </text:list>
      <text:h text:style-name="Heading_20_2" text:outline-level="2" text:is-list-header="true">4. Адаптивность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0">Брейкпоинт</text:p>
            </table:table-cell>
            <table:table-cell table:style-name="Table1.A1" office:value-type="string">
              <text:p text:style-name="P10">Ширина</text:p>
            </table:table-cell>
            <table:table-cell table:style-name="Table1.C1" office:value-type="string">
              <text:p text:style-name="P10">Сетка предметов</text:p>
            </table:table-cell>
          </table:table-row>
        </table:table-header-rows>
        <table:table-row>
          <table:table-cell table:style-name="Table1.A2" office:value-type="string">
            <text:p text:style-name="P11">xs</text:p>
          </table:table-cell>
          <table:table-cell table:style-name="Table1.A2" office:value-type="string">
            <text:p text:style-name="P11">&lt;576px</text:p>
          </table:table-cell>
          <table:table-cell table:style-name="Table1.C2" office:value-type="string">
            <text:p text:style-name="P11">1 колонка</text:p>
          </table:table-cell>
        </table:table-row>
        <table:table-row>
          <table:table-cell table:style-name="Table1.A2" office:value-type="string">
            <text:p text:style-name="P11">sm</text:p>
          </table:table-cell>
          <table:table-cell table:style-name="Table1.A2" office:value-type="string">
            <text:p text:style-name="P11">≥576px</text:p>
          </table:table-cell>
          <table:table-cell table:style-name="Table1.C2" office:value-type="string">
            <text:p text:style-name="P11">2 колонки</text:p>
          </table:table-cell>
        </table:table-row>
        <table:table-row>
          <table:table-cell table:style-name="Table1.A2" office:value-type="string">
            <text:p text:style-name="P11">md</text:p>
          </table:table-cell>
          <table:table-cell table:style-name="Table1.A2" office:value-type="string">
            <text:p text:style-name="P11">≥768px</text:p>
          </table:table-cell>
          <table:table-cell table:style-name="Table1.C2" office:value-type="string">
            <text:p text:style-name="P11">3 колонки</text:p>
          </table:table-cell>
        </table:table-row>
      </table:table>
      <text:p text:style-name="Text_20_body"/>
      <text:p text:style-name="Text_20_body">Навигация на мобильных устройствах сворачивается в гамбургер-меню (Bootstrap navbar).</text:p>
      <text:h text:style-name="Heading_20_2" text:outline-level="2">5. Мультиязычность</text:h>
      <text:list text:style-name="L9">
        <text:list-item>
          <text:p text:style-name="P12">Атрибут <text:span text:style-name="T2">data-i18n="ключ"</text:span> на всех переводимых элементах</text:p>
        </text:list-item>
        <text:list-item>
          <text:p text:style-name="P12">Функция <text:span text:style-name="T2">t(key)</text:span> разбирает ключ через reduce и возвращает перевод</text:p>
        </text:list-item>
        <text:list-item>
          <text:p text:style-name="P12">Файлы локализации: lang/en.json, lang/ru.json, lang/kk.json</text:p>
        </text:list-item>
        <text:list-item>
          <text:p text:style-name="P13">При смене языка:</text:p>
          <text:list>
            <text:list-item>
              <text:p text:style-name="P12">Загружается JSON</text:p>
            </text:list-item>
            <text:list-item>
              <text:p text:style-name="P12">Обновляются все data-i18n элементы</text:p>
            </text:list-item>
            <text:list-item>
              <text:p text:style-name="P12">Сбрасывается кэш предметов</text:p>
            </text:list-item>
            <text:list-item>
              <text:p text:style-name="P12">Если открыта страница предметов — данные перезагружаются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image-count="0" meta:object-count="0" meta:page-count="1" meta:paragraph-count="74" meta:word-count="511" meta:character-count="4371" meta:non-whitespace-character-count="3347"/>
    <meta:generator>LibreOffice/26.2.4.2$Linux_X86_64 LibreOffice_project/620$Build-2</meta:generator>
  </office:meta>
</office:document-meta>
</file>