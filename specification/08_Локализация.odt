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Heading">
      <style:paragraph-properties fo:text-align="left" style:justify-single-word="false"/>
    </style:style>
    <style:style style:name="P2" style:family="paragraph" style:parent-style-name="Table_20_Contents">
      <style:paragraph-properties fo:text-align="left" style:justify-single-word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пецификация локализации</text:h>
      <text:h text:style-name="Heading_20_2" text:outline-level="2">1. Поддерживаемые языки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">Код</text:p>
            </table:table-cell>
            <table:table-cell table:style-name="Table1.A1" office:value-type="string">
              <text:p text:style-name="P1">Язык</text:p>
            </table:table-cell>
            <table:table-cell table:style-name="Table1.C1" office:value-type="string">
              <text:p text:style-name="P1">Файл</text:p>
            </table:table-cell>
          </table:table-row>
        </table:table-header-rows>
        <table:table-row>
          <table:table-cell table:style-name="Table1.A2" office:value-type="string">
            <text:p text:style-name="P2">en</text:p>
          </table:table-cell>
          <table:table-cell table:style-name="Table1.A2" office:value-type="string">
            <text:p text:style-name="P2">English</text:p>
          </table:table-cell>
          <table:table-cell table:style-name="Table1.C2" office:value-type="string">
            <text:p text:style-name="P2">lang/en.json</text:p>
          </table:table-cell>
        </table:table-row>
        <table:table-row>
          <table:table-cell table:style-name="Table1.A2" office:value-type="string">
            <text:p text:style-name="P2">ru</text:p>
          </table:table-cell>
          <table:table-cell table:style-name="Table1.A2" office:value-type="string">
            <text:p text:style-name="P2">Русский</text:p>
          </table:table-cell>
          <table:table-cell table:style-name="Table1.C2" office:value-type="string">
            <text:p text:style-name="P2">lang/ru.json</text:p>
          </table:table-cell>
        </table:table-row>
        <table:table-row>
          <table:table-cell table:style-name="Table1.A2" office:value-type="string">
            <text:p text:style-name="P2">kk</text:p>
          </table:table-cell>
          <table:table-cell table:style-name="Table1.A2" office:value-type="string">
            <text:p text:style-name="P2">Қазақша</text:p>
          </table:table-cell>
          <table:table-cell table:style-name="Table1.C2" office:value-type="string">
            <text:p text:style-name="P2">lang/kk.json</text:p>
          </table:table-cell>
        </table:table-row>
      </table:table>
      <text:p text:style-name="Text_20_body"/>
      <text:h text:style-name="Heading_20_2" text:outline-level="2">2. Механизм работы</text:h>
      <text:h text:style-name="Heading_20_3" text:outline-level="3">2.1 Загрузка перевода</text:h>
      <text:p text:style-name="P3">function loadLang(lang) {<text:line-break/> <text:s text:c="3"/>return fetch(`lang/${lang}.json`)<text:line-break/> <text:s text:c="7"/>.then(r =&gt; { if (!r.ok) throw new Error(); return r.json(); })<text:line-break/> <text:s text:c="7"/>.then(data =&gt; {<text:line-break/> <text:s text:c="11"/>langData = data;<text:line-break/> <text:s text:c="11"/>currentLang = lang;<text:line-break/> <text:s text:c="11"/>localStorage.setItem('edu_lang', lang);<text:line-break/> <text:s text:c="11"/>document.getElementById('currentLangLabel').textContent = lang.toUpperCase();<text:line-break/> <text:s text:c="11"/>applyTranslations();<text:line-break/> <text:s text:c="11"/>subjectsCache = {};<text:line-break/> <text:s text:c="7"/>})<text:line-break/> <text:s text:c="7"/>.catch(() =&gt; { if (lang !== 'en') return loadLang('en'); });<text:line-break/>}</text:p>
      <text:list text:style-name="L1">
        <text:list-item>
          <text:p text:style-name="P4">Файлы загружаются через fetch</text:p>
        </text:list-item>
        <text:list-item>
          <text:p text:style-name="P4">При ошибке загрузки — fallback на английский</text:p>
        </text:list-item>
        <text:list-item>
          <text:p text:style-name="P4">Выбранный язык сохраняется в localStorage</text:p>
        </text:list-item>
      </text:list>
      <text:h text:style-name="Heading_20_3" text:outline-level="3" text:is-list-header="true">2.2 Применение переводов</text:h>
      <text:p text:style-name="P3">function t(key) {<text:line-break/> <text:s text:c="3"/>return key.split('.').reduce((o, k) =&gt; o?.[k] ?? key, langData);<text:line-break/>}<text:line-break/><text:line-break/>function applyTranslations() {<text:line-break/> <text:s text:c="3"/>document.querySelectorAll('[data-i18n]').forEach(el =&gt; {<text:line-break/> <text:s text:c="7"/>el.innerHTML = t(el.dataset.i18n);<text:line-break/> <text:s text:c="3"/>});<text:line-break/>}</text:p>
      <text:list text:style-name="L2">
        <text:list-item>
          <text:p text:style-name="P5">Атрибут <text:span text:style-name="T1">data-i18n="nav.home"</text:span> указывает ключ перевода</text:p>
        </text:list-item>
        <text:list-item>
          <text:p text:style-name="P5">Функция <text:span text:style-name="T1">t()</text:span> поддерживает вложенные ключи через точку</text:p>
        </text:list-item>
        <text:list-item>
          <text:p text:style-name="P5">Поддержка HTML в переводах (через innerHTML)</text:p>
        </text:list-item>
      </text:list>
      <text:h text:style-name="Heading_20_2" text:outline-level="2" text:is-list-header="true">3. Структура JSON-файлов</text:h>
      <text:h text:style-name="Heading_20_3" text:outline-level="3">3.1 Ключи локализации</text:h>
      <text:p text:style-name="P3">{<text:line-break/> <text:s/>"nav": {<text:line-break/> <text:s text:c="3"/>"home": "Главная", <text:s text:c="9"/>// Пункт меню "Главная"<text:line-break/> <text:s text:c="3"/>"subjects": "Предметы", <text:s text:c="4"/>// Пункт меню "Предметы"<text:line-break/> <text:s text:c="3"/>"about": "О нас" <text:s text:c="10"/>// Пункт меню "О нас"<text:line-break/> <text:s/>},<text:line-break/> <text:s/>"home": {<text:line-break/> <text:s text:c="3"/>"welcome": "...", <text:s text:c="10"/>// Заголовок главной<text:line-break/> <text:s text:c="3"/>"subtitle": "...", <text:s text:c="9"/>// Подзаголовок<text:line-break/> <text:s text:c="3"/>"start_learning": "...", <text:s text:c="3"/>// Кнопка "Начать обучение"<text:line-break/> <text:s text:c="3"/>"card1_title": "...", <text:s text:c="6"/>// Заголовок карточки 1<text:line-break/> <text:s text:c="3"/>"card1_text": "...", <text:s text:c="7"/>// Текст карточки 1<text:line-break/> <text:s text:c="3"/>"card2_title": "...", <text:s text:c="6"/>// Заголовок карточки 2<text:line-break/> <text:s text:c="3"/>"card2_text": "...", <text:s text:c="7"/>// Текст карточки 2<text:line-break/> <text:s text:c="3"/>"card3_title": "...", <text:s text:c="6"/>// Заголовок карточки 3<text:line-break/> <text:s text:c="3"/>"card3_text": "..." <text:s text:c="8"/>// Текст карточки 3<text:line-break/> <text:s/>},<text:line-break/> <text:s/>"subjects_page": {<text:line-break/> <text:s text:c="3"/>"heading": "Предметы", <text:s text:c="5"/>// Заголовок страницы предметов<text:line-break/> <text:s text:c="3"/>"themes_explain": "...", <text:s text:c="3"/>// Объяснение структуры<text:line-break/> <text:s text:c="3"/>"back_subjects": "...", <text:s text:c="4"/>// Кнопка "Назад к предметам"<text:line-break/> <text:s text:c="3"/>"back_themes": "...", <text:s text:c="6"/>// Кнопка "Назад к темам"<text:line-break/> <text:s text:c="3"/>"loading": "Загрузка...", <text:s/>// Индикатор загрузки<text:line-break/> <text:s text:c="3"/>"show_explanation": "...", <text:s/>// Кнопка "Показать объяснение"<text:line-break/> <text:s text:c="3"/>"examples": "Примеры" <text:s text:c="5"/>// Заголовок раздела примеров<text:line-break/> <text:s/>},<text:line-break/> <text:s/>"about": {<text:line-break/> <text:s text:c="3"/>"heading": "...", <text:s text:c="10"/>// Заголовок страницы "О нас"<text:line-break/> <text:s text:c="3"/>"p1": "...", <text:s text:c="15"/>// Абзац 1<text:line-break/> <text:s text:c="3"/>"p2": "...", <text:s text:c="15"/>// Абзац 2<text:line-break/> <text:s text:c="3"/>"how_title": "...", <text:s text:c="8"/>// Заголовок "Как это работает"<text:line-break/> <text:s text:c="3"/>"step1": "...", <text:s text:c="12"/>// Шаг 1<text:line-break/> <text:s text:c="3"/>"step2": "...", <text:s text:c="12"/>// Шаг 2<text:line-break/> <text:s text:c="3"/>"step3": "...", <text:s text:c="12"/>// Шаг 3<text:line-break/> <text:s text:c="3"/>"built_with": "..." <text:s text:c="8"/>// Технологии<text:line-break/> <text:s/>},<text:line-break/> <text:s/>"footer": "...", <text:s text:c="13"/>// Текст футера<text:line-break/> <text:s/>"watch": "...", <text:s text:c="14"/>// Текст кнопки YouTube<text:line-break/> <text:s/>"language": "..." <text:s text:c="12"/>// Подпись переключателя<text:line-break/>}</text:p>
      <text:h text:style-name="Heading_20_2" text:outline-level="2">4. Мультиязычность данных БД</text:h>
      <text:p text:style-name="Text_20_body">Данные предметов, разделов и тем также поддерживают 3 языка через отдельные столбцы:</text:p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1">Поле EN</text:p>
            </table:table-cell>
            <table:table-cell table:style-name="Table2.A1" office:value-type="string">
              <text:p text:style-name="P1">Поле RU</text:p>
            </table:table-cell>
            <table:table-cell table:style-name="Table2.C1" office:value-type="string">
              <text:p text:style-name="P1">Поле KK</text:p>
            </table:table-cell>
          </table:table-row>
        </table:table-header-rows>
        <table:table-row>
          <table:table-cell table:style-name="Table2.A2" office:value-type="string">
            <text:p text:style-name="P2">name</text:p>
          </table:table-cell>
          <table:table-cell table:style-name="Table2.A2" office:value-type="string">
            <text:p text:style-name="P2">name_ru</text:p>
          </table:table-cell>
          <table:table-cell table:style-name="Table2.C2" office:value-type="string">
            <text:p text:style-name="P2">name_kk</text:p>
          </table:table-cell>
        </table:table-row>
        <table:table-row>
          <table:table-cell table:style-name="Table2.A2" office:value-type="string">
            <text:p text:style-name="P2">description</text:p>
          </table:table-cell>
          <table:table-cell table:style-name="Table2.A2" office:value-type="string">
            <text:p text:style-name="P2">description_ru</text:p>
          </table:table-cell>
          <table:table-cell table:style-name="Table2.C2" office:value-type="string">
            <text:p text:style-name="P2">description_kk</text:p>
          </table:table-cell>
        </table:table-row>
        <table:table-row>
          <table:table-cell table:style-name="Table2.A2" office:value-type="string">
            <text:p text:style-name="P2">title</text:p>
          </table:table-cell>
          <table:table-cell table:style-name="Table2.A2" office:value-type="string">
            <text:p text:style-name="P2">title_ru</text:p>
          </table:table-cell>
          <table:table-cell table:style-name="Table2.C2" office:value-type="string">
            <text:p text:style-name="P2">title_kk</text:p>
          </table:table-cell>
        </table:table-row>
        <table:table-row>
          <table:table-cell table:style-name="Table2.A2" office:value-type="string">
            <text:p text:style-name="P2">summary</text:p>
          </table:table-cell>
          <table:table-cell table:style-name="Table2.A2" office:value-type="string">
            <text:p text:style-name="P2">summary_ru</text:p>
          </table:table-cell>
          <table:table-cell table:style-name="Table2.C2" office:value-type="string">
            <text:p text:style-name="P2">summary_kk</text:p>
          </table:table-cell>
        </table:table-row>
        <table:table-row>
          <table:table-cell table:style-name="Table2.A2" office:value-type="string">
            <text:p text:style-name="P2">examples</text:p>
          </table:table-cell>
          <table:table-cell table:style-name="Table2.A2" office:value-type="string">
            <text:p text:style-name="P2">examples_ru</text:p>
          </table:table-cell>
          <table:table-cell table:style-name="Table2.C2" office:value-type="string">
            <text:p text:style-name="P2">examples_kk</text:p>
          </table:table-cell>
        </table:table-row>
      </table:table>
      <text:p text:style-name="Text_20_body"/>
      <text:p text:style-name="Text_20_body">API динамически выбирает нужный столбец:</text:p>
      <text:p text:style-name="P3">$suffix = $lang === 'en' ? '' : "_$lang";<text:line-break/>// "SELECT name{$suffix} AS name ..."</text:p>
      <text:h text:style-name="Heading_20_2" text:outline-level="2">5. Поведение при смене языка</text:h>
      <text:list text:style-name="L3">
        <text:list-item>
          <text:p text:style-name="P6">Пользователь нажимает на язык в выпадающем меню</text:p>
        </text:list-item>
        <text:list-item>
          <text:p text:style-name="P6">Вызывается <text:span text:style-name="T1">setLang(lang)</text:span></text:p>
        </text:list-item>
        <text:list-item>
          <text:p text:style-name="P6">Загружается новый JSON-файл перевода</text:p>
        </text:list-item>
        <text:list-item>
          <text:p text:style-name="P6">Применяются переводы через <text:span text:style-name="T1">applyTranslations()</text:span></text:p>
        </text:list-item>
        <text:list-item>
          <text:p text:style-name="P6">Сбрасывается кэш предметов (<text:span text:style-name="T1">subjectsCache = {}</text:span>)</text:p>
        </text:list-item>
        <text:list-item>
          <text:p text:style-name="P6">Если открыта страница предметов — данные перезагружаются с новым языком</text:p>
        </text:list-item>
        <text:list-item>
          <text:p text:style-name="P6">Выбранный язык сохраняется в localStorage и восстанавливается при следующем визите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erif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2" meta:image-count="0" meta:object-count="0" meta:page-count="1" meta:paragraph-count="58" meta:word-count="437" meta:character-count="3712" meta:non-whitespace-character-count="2844"/>
    <meta:generator>LibreOffice/26.2.4.2$Linux_X86_64 LibreOffice_project/620$Build-2</meta:generator>
  </office:meta>
</office:document-meta>
</file>